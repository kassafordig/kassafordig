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8B0000030024D30EAA.bmp"/>
  <manifest:file-entry manifest:media-type="" manifest:full-path="Pictures/1000000000000505000003251C6615F0.bmp"/>
  <manifest:file-entry manifest:media-type="" manifest:full-path="Pictures/100000000000050400000322D4B943AB.bmp"/>
  <manifest:file-entry manifest:media-type="" manifest:full-path="Pictures/10000000000002BE00000350DA805DB0.bmp"/>
  <manifest:file-entry manifest:media-type="" manifest:full-path="Pictures/10000000000005000000032478C07C04.bmp"/>
  <manifest:file-entry manifest:media-type="" manifest:full-path="Pictures/10000000000004FF0000032283CC9B1C.bmp"/>
  <manifest:file-entry manifest:media-type="" manifest:full-path="Pictures/1000000000000383000002349E767DAB.bmp"/>
  <manifest:file-entry manifest:media-type="" manifest:full-path="Pictures/100000000000050400000324ED3CBA44.bmp"/>
  <manifest:file-entry manifest:media-type="" manifest:full-path="Pictures/10000000000004EF000003131A31BF8A.bmp"/>
  <manifest:file-entry manifest:media-type="" manifest:full-path="Pictures/100000000000050200000321C4992854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alibri1" svg:font-family="Calibri"/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Arial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4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Arial" fo:font-size="16pt" fo:font-weight="bold" fo:background-color="transparent" style:font-name-asian="Calibri1" style:font-size-asian="16pt" style:font-weight-asian="bold" style:font-name-complex="Calibri1" style:font-size-complex="16pt" style:font-weight-complex="bold"/>
    </style:style>
    <style:style style:name="P5" style:family="paragraph" style:parent-style-name="Standard">
      <style:paragraph-properties fo:margin-top="0cm" fo:margin-bottom="0.353cm" fo:line-height="115%" fo:text-align="start" style:justify-single-word="false"/>
      <style:text-properties fo:font-size="12pt"/>
    </style:style>
    <style:style style:name="P6" style:family="paragraph" style:parent-style-name="Standard">
      <style:paragraph-properties fo:margin-top="0cm" fo:margin-bottom="0.353cm" fo:line-height="115%" fo:text-align="start" style:justify-single-word="false"/>
    </style:style>
    <style:style style:name="P7" style:family="paragraph" style:parent-style-name="Text_20_body">
      <style:paragraph-properties fo:margin-top="0cm" fo:margin-bottom="0.353cm" fo:line-height="115%" fo:text-align="start" style:justify-single-word="false"/>
      <style:text-properties fo:color="#000000" style:font-name="Arial1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8" style:family="paragraph" style:parent-style-name="Text_20_body">
      <style:paragraph-properties fo:margin-top="0cm" fo:margin-bottom="0.349cm" fo:line-height="115%" fo:text-align="start" style:justify-single-word="false"/>
      <style:text-properties fo:color="#000000" style:font-name="Arial1" fo:font-size="14pt" fo:font-weight="bold" fo:background-color="transparent"/>
    </style:style>
    <style:style style:name="P9" style:family="paragraph" style:parent-style-name="Text_20_body">
      <style:paragraph-properties fo:margin-top="0cm" fo:margin-bottom="0.349cm" fo:line-height="115%" fo:text-align="start" style:justify-single-word="false"/>
    </style:style>
    <style:style style:name="P10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Arial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T1" style:family="text">
      <style:text-properties style:use-window-font-color="true" style:font-name="Calibri1" fo:language="zxx" fo:country="none" fo:font-weight="normal" fo:background-color="transparent" style:font-name-asian="Calibri1" style:font-size-asian="12pt" style:font-name-complex="Calibri1" style:font-size-complex="12pt"/>
    </style:style>
    <style:style style:name="T2" style:family="text">
      <style:text-properties style:use-window-font-color="true" style:font-name="Calibri1" fo:font-size="15pt" fo:language="zxx" fo:country="none" fo:font-weight="bold" fo:background-color="transparent" style:font-name-asian="Calibri1" style:font-size-asian="15pt" style:font-weight-asian="bold" style:font-name-complex="Calibri1" style:font-size-complex="15pt" style:font-weight-complex="bold"/>
    </style:style>
    <style:style style:name="T3" style:family="text">
      <style:text-properties style:use-window-font-color="true" style:font-name="Calibri1" fo:font-size="15pt" fo:language="zxx" fo:country="none" fo:font-weight="normal" fo:background-color="transparent" style:font-name-asian="Calibri1" style:font-size-asian="15pt" style:font-name-complex="Calibri1" style:font-size-complex="15pt"/>
    </style:style>
    <style:style style:name="T4" style:family="text">
      <style:text-properties style:use-window-font-color="true" style:font-name="Arial" fo:font-size="16pt" fo:font-weight="bold" fo:background-color="transparent" style:font-name-asian="Calibri1" style:font-size-asian="16pt" style:font-weight-asian="bold" style:font-name-complex="Calibri1" style:font-size-complex="16pt" style:font-weight-complex="bold"/>
    </style:style>
    <style:style style:name="T5" style:family="text">
      <style:text-properties fo:font-size="15pt" fo:language="zxx" fo:country="none" fo:font-weight="bold" style:font-size-asian="15pt" style:font-weight-asian="bold" style:font-size-complex="15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style:font-name="Arial1" fo:font-size="16pt" fo:font-weight="bold" fo:background-color="transparent"/>
    </style:style>
    <style:style style:name="T9" style:family="text">
      <style:text-properties fo:color="#000000" style:font-name="Arial1" fo:font-size="14pt" fo:font-weight="bold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1"><text:s text:c="14"/></text:span><text:span text:style-name="T3"><text:s text:c="2"/></text:span><text:span text:style-name="T2">GRUNDLÄGGANDE ANVÄNDNING AV </text:span><text:span text:style-name="T5">KASSAREGISTER CHD 6800</text:span></text:p>
      <text:p text:style-name="P1"/>
      <text:p text:style-name="P1"/>
      <text:p text:style-name="P1"><draw:frame draw:style-name="fr1" draw:name="grafik1" text:anchor-type="paragraph" svg:width="15.399cm" svg:height="19.42cm" draw:z-index="0"><draw:image xlink:href="Pictures/10000000000002BE00000350DA805DB0.bmp" xlink:type="simple" xlink:show="embed" xlink:actuate="onLoad"/></draw:frame></text:p>
      <text:p text:style-name="P1"/>
      <text:p text:style-name="P1"/>
      <text:p text:style-name="P3"><text:soft-page-break/><text:s text:c="43"/>ANSLUTNINGAR</text:p>
      <text:p text:style-name="P1"><draw:frame draw:style-name="fr2" draw:name="grafik2" text:anchor-type="paragraph" svg:width="17cm" svg:height="20.399cm" draw:z-index="1"><draw:image xlink:href="Pictures/100000000000028B0000030024D30EAA.bmp" xlink:type="simple" xlink:show="embed" xlink:actuate="onLoad"/></draw:frame></text:p>
      <text:p text:style-name="P1"/>
      <text:p text:style-name="P1"/>
      <text:p text:style-name="P1"/>
      <text:p text:style-name="P1"/>
      <text:p text:style-name="P6"><text:soft-page-break/><text:span text:style-name="T4"><text:s text:c="28"/></text:span><text:span text:style-name="T8">STARTA KASSAPROGRAMMET.</text:span></text:p>
      <text:p text:style-name="P3"><draw:frame draw:style-name="fr2" draw:name="grafik3" text:anchor-type="paragraph" svg:width="17cm" svg:height="10.645cm" draw:z-index="2"><draw:image xlink:href="Pictures/100000000000050400000324ED3CBA44.bmp" xlink:type="simple" xlink:show="embed" xlink:actuate="onLoad"/></draw:frame></text:p>
      <text:p text:style-name="P3">Hur man kommer till PGM och QuickSupport.</text:p>
      <text:p text:style-name="P3">Dra med fingret neråt för att komma till PGM läge, se bild.</text:p>
      <text:p text:style-name="P3"><draw:frame draw:style-name="fr1" draw:name="grafik4" text:anchor-type="paragraph" svg:width="17cm" svg:height="10.664cm" draw:z-index="3"><draw:image xlink:href="Pictures/1000000000000383000002349E767DAB.bmp" xlink:type="simple" xlink:show="embed" xlink:actuate="onLoad"/></draw:frame></text:p>
      <text:p text:style-name="P7"><text:soft-page-break/>1. Tryck på verktygssymbolen för att komma till PGM-läge,se bild. </text:p>
      <text:p text:style-name="P9"><text:span text:style-name="T9">2. </text:span><text:span text:style-name="T7">Avancerat läge, endast för installatör.</text:span></text:p>
      <text:p text:style-name="P8">3. Tryck på runda ringen för att komma till QuickSupport, se bild.</text:p>
      <text:p text:style-name="P8">PGM och Settings bör bara användas av behöriga personer som läst användarmanualen.</text:p>
      <text:p text:style-name="P3"><draw:frame draw:style-name="fr1" draw:name="grafik5" text:anchor-type="paragraph" svg:width="17cm" svg:height="10.654cm" draw:z-index="4"><draw:image xlink:href="Pictures/100000000000050400000322D4B943AB.bmp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 text:c="29"/>Korrigera artikel.</text:p>
      <text:p text:style-name="P3">1. Tryck på NER/UPP knapparna för att välja artikel.</text:p>
      <text:p text:style-name="P3">2. Tryck SUBTOTAL(markera)</text:p>
      <text:p text:style-name="P3">3.Tryck på TIDIGARE FELSLAG, avsluta sedan köpet, se bild.</text:p>
      <text:p text:style-name="P3"><draw:frame draw:style-name="fr1" draw:name="grafik6" text:anchor-type="paragraph" svg:width="17cm" svg:height="10.664cm" draw:z-index="5"><draw:image xlink:href="Pictures/10000000000004FF0000032283CC9B1C.bmp" xlink:type="simple" xlink:show="embed" xlink:actuate="onLoad"/></draw:frame>De inringade röda knapparna är:</text:p>
      <text:p text:style-name="P3">Tryck på återköp och återköp sista kvittot så gör kassan återköp på sista försäljningen, se bild ovan, ryck på tillbaka.</text:p>
      <text:p text:style-name="P3">Tryck på återköp och återköp och tillbaka så kan du göra återköp på gammal vara. Efter återköpet så är det bara att sälja som vanligt, , se bild ovan.</text:p>
      <text:p text:style-name="P3">Allt bort tar bort allt inslaget, , se bild ovan.</text:p>
      <text:p text:style-name="P3">KORR tar bort sista inslagna vara, <text:s text:c="2"/>En vara, tryck ALLT BORT, se bild.</text:p>
      <text:p text:style-name="P3">C <text:s/>tar bort sista inslagna siffror, se bild ovan.</text:p>
      <text:p text:style-name="P3">Om du valt återköp men ändrar dig så tryck på C så går kassan tillbaka till REG-läge.</text:p>
      <text:p text:style-name="P3">Den gula knappen 2 gör också kvittokopia, se bild ovan.</text:p>
      <text:p text:style-name="P4"><text:soft-page-break/><text:s text:c="27"/>Övriga funktioner X/Z &amp; växelkassa</text:p>
      <text:p text:style-name="P3">Om man trycker på grön knapp ÖVR. FUNK-TIONER så kommer man till X/Z sidan.</text:p>
      <text:p text:style-name="P3"><draw:frame draw:style-name="fr2" draw:name="grafik7" text:anchor-type="paragraph" svg:width="17cm" svg:height="10.649cm" draw:z-index="6"><draw:image xlink:href="Pictures/1000000000000505000003251C6615F0.bmp" xlink:type="simple" xlink:show="embed" xlink:actuate="onLoad"/></draw:frame> -Växel in + belopp + kontant = växelkassa.</text:p>
      <text:p text:style-name="P3">- Utbetalning + belopp + kontant = Utbetalning.</text:p>
      <text:p text:style-name="P3">- Vid ny programmering av kassan exempel priser så är det viktigt att göra en backup på det, gå därför alltid in på övriga funktioner och gör en backup.</text:p>
      <text:p text:style-name="P3">- Tryck på kommentar om du vill skriva en kommentar på kvittot. <text:s text:c="32"/></text:p>
      <text:p text:style-name="P3"/>
      <text:p text:style-name="P3"/>
      <text:p text:style-name="P3"/>
      <text:p text:style-name="P3"/>
      <text:p text:style-name="P3"/>
      <text:p text:style-name="P3"/>
      <text:p text:style-name="P3"><text:s text:c="17"/><text:span text:style-name="T6"><text:s text:c="2"/>Att göra X/Z ( X &amp; Z fungerar på samma sätt.)</text:span></text:p>
      <text:p text:style-name="P3"><draw:frame draw:style-name="fr2" draw:name="grafik8" text:anchor-type="paragraph" svg:width="17cm" svg:height="10.62cm" draw:z-index="7"><draw:image xlink:href="Pictures/100000000000050200000321C4992854.bmp" xlink:type="simple" xlink:show="embed" xlink:actuate="onLoad"/></draw:frame><text:soft-page-break/>1. Daily= Z(Dagsavslut)</text:p>
      <text:p text:style-name="P3">2. Period financial = Periodisk Z som är från det datum du senast gjorde periodisk Z Ska man göra periodisk Z så bör det ske sista dan I månade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30"/>Göra kopia på gammalt kvitto</text:p>
      <text:p text:style-name="P3"><text:soft-page-break/>I försäljningsläge så drar man touch skärmen till höger för att leta på det gamla kvittot, se bild. </text:p>
      <text:p text:style-name="P3"><draw:frame draw:style-name="fr1" draw:name="grafik9" text:anchor-type="paragraph" svg:width="17cm" svg:height="10.553cm" draw:z-index="8"><draw:image xlink:href="Pictures/10000000000004EF000003131A31BF8A.bmp" xlink:type="simple" xlink:show="embed" xlink:actuate="onLoad"/></draw:frame>I övriga funktioner och X så trycker man på print receipt by mummer, sedan så fyller man I kvittonummer och trycker confirm, se bild</text:p>
      <text:p text:style-name="P3"><draw:frame draw:style-name="fr1" draw:name="grafik10" text:anchor-type="paragraph" svg:width="17cm" svg:height="10.661cm" draw:z-index="9"><draw:image xlink:href="Pictures/10000000000005000000032478C07C04.bmp" xlink:type="simple" xlink:show="embed" xlink:actuate="onLoad"/></draw:frame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alibri1" svg:font-family="Calibri"/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print-date>2024-12-13T10:39:01.50</meta:print-date>
    <dc:date>2024-12-17T12:47:32.63</dc:date>
    <meta:editing-duration>P6DT23H17M8S</meta:editing-duration>
    <meta:editing-cycles>15</meta:editing-cycles>
    <meta:generator>OpenOffice/4.1.11$Win32 OpenOffice.org_project/4111m1$Build-9808</meta:generator>
    <meta:document-statistic meta:table-count="0" meta:image-count="10" meta:object-count="0" meta:page-count="9" meta:paragraph-count="33" meta:word-count="370" meta:character-count="2317"/>
  </office:meta>
</office:document-meta>
</file>